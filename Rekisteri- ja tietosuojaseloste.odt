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FI" style:language-asian="en" style:country-asian="FI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1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1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7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8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29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1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43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44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0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1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6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7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3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4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5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6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7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73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74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75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FI" style:language-asian="en" style:country-asian="FI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FI" style:language-asian="en" style:country-asian="FI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2"><text:span text:style-name="T2">1. Rekisterinpitäjä</text:span><text:span text:style-name="T3"><text:tab/></text:span><text:span text:style-name="T4"><text:tab/></text:span><text:span text:style-name="T5"><text:tab/></text:span><text:span text:style-name="T6"><text:tab/><text:s text:c="27"/></text:span><text:span text:style-name="T7">Päivitetty 28.4.2026</text:span><text:span text:style-name="T8"><text:s/></text:span></text:h>
      <text:p text:style-name="P9">Avara Lasitus Oy<text:line-break/>Y-tunnus:<text:s/>3619994-7<text:line-break/>Osoite: Pitkämäenkatu 9, 20250 Turku<text:line-break/>Puhelin: +358 44 910 8964<text:line-break/>Sähköposti: info@avaralasitus.fi</text:p>
      <text:p text:style-name="P10"><text:span text:style-name="T11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2" text:outline-level="2">2. Rekisterin nimi</text:h>
      <text:p text:style-name="P13">Avara Lasitus Oy:n asiakas- ja markkinointirekisteri</text:p>
      <text:p text:style-name="P14"><text:span text:style-name="T15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16" text:outline-level="2">3. Henkilötietojen käsittelyn tarkoitus</text:h>
      <text:p text:style-name="P17">Henkilötietoja käsitellään seuraaviin tarkoituksiin:</text:p>
      <text:list text:style-name="LFO1" text:continue-numbering="true">
        <text:list-item>
          <text:p text:style-name="P18">asiakassuhteen hoitaminen ja ylläpito<text:s/></text:p>
        </text:list-item>
        <text:list-item>
          <text:p text:style-name="P19">tarjouspyyntöihin vastaaminen<text:s/></text:p>
        </text:list-item>
        <text:list-item>
          <text:p text:style-name="P20">palveluiden toimittaminen ja laskutus<text:s/></text:p>
        </text:list-item>
        <text:list-item>
          <text:p text:style-name="P21">asiakasviestintä ja asiakaspalvelu<text:s/></text:p>
        </text:list-item>
        <text:list-item>
          <text:p text:style-name="P22">markkinointi (lain sallimissa rajoissa)<text:s/></text:p>
        </text:list-item>
      </text:list>
      <text:p text:style-name="P23"><text:span text:style-name="T24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25" text:outline-level="2">4. Käsiteltävät henkilötiedot</text:h>
      <text:p text:style-name="P26">Rekisteri voi sisältää seuraavia tietoja:</text:p>
      <text:list text:style-name="LFO2" text:continue-numbering="true">
        <text:list-item>
          <text:p text:style-name="P27">nimi<text:s/></text:p>
        </text:list-item>
        <text:list-item>
          <text:p text:style-name="P28">puhelinnumero<text:s/></text:p>
        </text:list-item>
        <text:list-item>
          <text:p text:style-name="P29">sähköpostiosoite<text:s/></text:p>
        </text:list-item>
        <text:list-item>
          <text:p text:style-name="P30">osoitetiedot<text:s/></text:p>
        </text:list-item>
        <text:list-item>
          <text:p text:style-name="P31">tiedot tilatuista palveluista<text:s/></text:p>
        </text:list-item>
        <text:list-item>
          <text:p text:style-name="P32">yhteydenotot ja asiakaspalautteet<text:s/></text:p>
        </text:list-item>
      </text:list>
      <text:p text:style-name="P33"><text:span text:style-name="T34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35" text:outline-level="2">5. Säännönmukaiset tietolähteet</text:h>
      <text:p text:style-name="P36">Tiedot saadaan:</text:p>
      <text:list text:style-name="LFO3" text:continue-numbering="true">
        <text:list-item>
          <text:p text:style-name="P37">asiakkaalta itseltään (yhteydenottolomake, puhelin, sähköposti)<text:s/></text:p>
        </text:list-item>
        <text:list-item>
          <text:p text:style-name="P38">asiakassuhteen aikana syntyvistä tiedoista<text:s/></text:p>
        </text:list-item>
      </text:list>
      <text:soft-page-break/>
      <text:p text:style-name="P39"><text:span text:style-name="T40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41" text:outline-level="2">6. Tietojen luovutus ja siirto</text:h>
      <text:p text:style-name="P42">Tietoja ei luovuteta kolmansille osapuolille ilman asiakkaan suostumusta, ellei:</text:p>
      <text:list text:style-name="LFO4" text:continue-numbering="true">
        <text:list-item>
          <text:p text:style-name="P43">lainsäädäntö velvoita<text:s/></text:p>
        </text:list-item>
        <text:list-item>
          <text:p text:style-name="P44">se ole välttämätöntä palvelun toteuttamiseksi (esim. laskutus tai rahoituskumppani, kuten OP Rahoitus)<text:s/></text:p>
        </text:list-item>
      </text:list>
      <text:p text:style-name="P45">Tietoja ei siirretä EU/ETA-alueen ulkopuolelle ilman asianmukaisia suojatoimia.</text:p>
      <text:p text:style-name="P46"><text:span text:style-name="T47"><draw:custom-shape svg:x="0in" svg:y="0in" svg:width="45.51042in" svg:height="0.0013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48" text:outline-level="2">7. Tietojen säilytysaika</text:h>
      <text:p text:style-name="P49">Henkilötietoja säilytetään vain niin kauan kuin on tarpeen:</text:p>
      <text:list text:style-name="LFO5" text:continue-numbering="true">
        <text:list-item>
          <text:p text:style-name="P50">asiakassuhteen hoitamiseksi<text:s/></text:p>
        </text:list-item>
        <text:list-item>
          <text:p text:style-name="P51">lakisääteisten velvoitteiden täyttämiseksi<text:s/></text:p>
        </text:list-item>
      </text:list>
      <text:p text:style-name="P52"><text:span text:style-name="T53"><draw:custom-shape svg:x="0in" svg:y="0in" svg:width="45.51042in" svg:height="0.00139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54" text:outline-level="2">8. Rekisterin suojaus</text:h>
      <text:p text:style-name="P55">Tietoja käsitellään luottamuksellisesti ja suojataan asianmukaisesti:</text:p>
      <text:list text:style-name="LFO6" text:continue-numbering="true">
        <text:list-item>
          <text:p text:style-name="P56">teknisin suojauskeinoin (esim. salatut yhteydet)<text:s/></text:p>
        </text:list-item>
        <text:list-item>
          <text:p text:style-name="P57">organisatorisin toimenpitein<text:s/></text:p>
        </text:list-item>
      </text:list>
      <text:p text:style-name="P58">Pääsy tietoihin on vain niillä henkilöillä, joilla on siihen työtehtäviensä perusteella oikeus.</text:p>
      <text:p text:style-name="P59"><text:span text:style-name="T60"><draw:custom-shape svg:x="0in" svg:y="0in" svg:width="45.51042in" svg:height="0.00139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61" text:outline-level="2">9. Rekisteröidyn oikeudet</text:h>
      <text:p text:style-name="P62">Rekisteröidyllä on oikeus:</text:p>
      <text:list text:style-name="LFO7" text:continue-numbering="true">
        <text:list-item>
          <text:p text:style-name="P63">tarkastaa itseään koskevat tiedot<text:s/></text:p>
        </text:list-item>
        <text:list-item>
          <text:p text:style-name="P64">pyytää virheellisten tietojen korjaamista<text:s/></text:p>
        </text:list-item>
        <text:list-item>
          <text:p text:style-name="P65">pyytää tietojen poistamista (lainsäädännön rajoissa)<text:s/></text:p>
        </text:list-item>
        <text:list-item>
          <text:p text:style-name="P66">vastustaa tai rajoittaa tietojen käsittelyä<text:s/></text:p>
        </text:list-item>
        <text:list-item>
          <text:p text:style-name="P67">siirtää tiedot järjestelmästä toiseen<text:s/></text:p>
        </text:list-item>
      </text:list>
      <text:p text:style-name="P68">Pyynnöt tulee lähettää sähköpostitse: info@avaralasitus.fi</text:p>
      <text:p text:style-name="P69"><text:span text:style-name="T70"><draw:custom-shape svg:x="0in" svg:y="0in" svg:width="45.51042in" svg:height="0.00139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71" text:outline-level="2">10. Evästeet (cookies)</text:h>
      <text:p text:style-name="P72">Verkkosivusto voi käyttää evästeitä:</text:p>
      <text:list text:style-name="LFO8" text:continue-numbering="true">
        <text:list-item>
          <text:p text:style-name="P73">sivuston toiminnan varmistamiseen<text:s/></text:p>
        </text:list-item>
        <text:list-item>
          <text:p text:style-name="P74">käyttökokemuksen parantamiseen<text:s/></text:p>
        </text:list-item>
        <text:list-item>
          <text:p text:style-name="P75">analytiikkaan<text:s/></text:p>
        </text:list-item>
      </text:list>
      <text:p text:style-name="P76">Käyttäjä voi hallita evästeitä selaimen asetuksista.</text:p>
      <text:p text:style-name="P77"><text:span text:style-name="T78"><draw:custom-shape svg:x="0in" svg:y="0in" svg:width="45.51042in" svg:height="0.00139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h text:style-name="P79" text:outline-level="2">11. Muutokset tietosuojaselosteeseen</text:h>
      <text:p text:style-name="P80">Pidätämme oikeuden päivittää tätä tietosuojaselostetta tarvittaessa esimerkiksi lainsäädännön muuttuessa.</text:p>
      <text:p text:style-name="P81"><text:span text:style-name="T82"><draw:custom-shape svg:x="0in" svg:y="0in" svg:width="45.51042in" svg:height="0.00139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P83" text:outline-level="2">12. Yhteydenotot</text:h>
      <text:p text:style-name="P84">Tietosuojaan liittyvissä kysymyksissä:<text:line-break/>info@avaralasitus.fi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ko Siitonen</meta:initial-creator>
    <dc:creator>Marko Siitonen</dc:creator>
    <meta:creation-date>2026-04-28T09:38:00Z</meta:creation-date>
    <dc:date>2026-04-28T09:38:00Z</dc:date>
    <meta:template xlink:href="Normal" xlink:type="simple"/>
    <meta:editing-cycles>2</meta:editing-cycles>
    <meta:editing-duration>PT0S</meta:editing-duration>
    <meta:document-statistic meta:page-count="3" meta:paragraph-count="4" meta:word-count="360" meta:character-count="2411" meta:row-count="17" meta:non-whitespace-character-count="2055"/>
  </office:meta>
</office:document-meta>
</file>